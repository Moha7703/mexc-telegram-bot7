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f1115" loext:opacity="100%" fo:font-family="Menlo, Monaco, Consolas, 'Cascadia Mono', 'Ubuntu Mono', 'DejaVu Sans Mono', 'Liberation Mono', 'JetBrains Mono', 'Fira Code', Cousine, 'Roboto Mono', 'Courier New', Courier, sans-serif, system-ui" fo:font-size="10.5pt" fo:letter-spacing="normal" fo:language="en" fo:country="US" fo:font-style="normal" fo:font-weight="normal" officeooo:rsid="001d3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aiogram</text:p>
      <text:p text:style-name="P1">python-dotenv</text:p>
      <text:p text:style-name="P1">ccxt</text:p>
      <text:p text:style-name="P1">aiohttp_socks</text:p>
      <text:p text:style-name="P1">Flas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20:58:48.456529600</meta:creation-date>
    <dc:date>2026-06-08T20:50:39.603800500</dc:date>
    <meta:editing-duration>PT21M6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5" meta:word-count="5" meta:character-count="42" meta:non-whitespace-character-count="42"/>
  </office:meta>
</office:document-meta>
</file>